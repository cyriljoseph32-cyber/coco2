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style:font-name="Segoe UI Emoji" style:font-name-complex="Segoe UI Emoji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Normal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text-properties fo:language="fr" fo:country="FR"/>
    </style:style>
    <style:style style:name="P26" style:parent-style-name="Normal" style:family="paragraph">
      <style:text-properties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P35" style:parent-style-name="Normal" style:family="paragraph">
      <style:text-properties fo:language="fr" fo:country="FR"/>
    </style:style>
    <style:style style:name="P36" style:parent-style-name="Normal" style:family="paragraph">
      <style:text-properties fo:language="fr" fo:country="FR"/>
    </style:style>
    <style:style style:name="T37" style:parent-style-name="Policepardéfaut" style:family="text">
      <style:text-properties fo:language="fr" fo:country="FR"/>
    </style:style>
    <style:style style:name="T38" style:parent-style-name="Policepardéfaut" style:family="text">
      <style:text-properties fo:language="fr" fo:country="FR"/>
    </style:style>
    <style:style style:name="P39" style:parent-style-name="Normal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Normal" style:family="paragraph">
      <style:text-properties fo:language="fr" fo:country="FR"/>
    </style:style>
    <style:style style:name="T43" style:parent-style-name="Policepardéfaut" style:family="text">
      <style:text-properties fo:language="fr" fo:country="FR"/>
    </style:style>
    <style:style style:name="T44" style:parent-style-name="Policepardéfaut" style:family="text">
      <style:text-properties fo:language="fr" fo:country="FR"/>
    </style:style>
    <style:style style:name="T45" style:parent-style-name="Policepardéfaut" style:family="text">
      <style:text-properties fo:language="fr" fo:country="FR"/>
    </style:style>
    <style:style style:name="T46" style:parent-style-name="Policepardéfaut" style:family="text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Normal" style:family="paragraph">
      <style:text-properties fo:language="fr" fo:country="FR"/>
    </style:style>
    <style:style style:name="P49" style:parent-style-name="Normal" style:family="paragraph">
      <style:text-properties fo:language="fr" fo:country="FR"/>
    </style:style>
    <style:style style:name="P50" style:parent-style-name="Normal" style:family="paragraph">
      <style:text-properties fo:language="fr" fo:country="FR"/>
    </style:style>
    <style:style style:name="P51" style:parent-style-name="Normal" style:family="paragraph">
      <style:text-properties fo:language="fr" fo:country="FR"/>
    </style:style>
    <style:style style:name="P52" style:parent-style-name="Normal" style:family="paragraph">
      <style:text-properties fo:language="fr" fo:country="FR"/>
    </style:style>
    <style:style style:name="P53" style:parent-style-name="Normal" style:family="paragraph">
      <style:text-properties fo:language="fr" fo:country="FR"/>
    </style:style>
    <style:style style:name="P54" style:parent-style-name="Normal" style:family="paragraph">
      <style:text-properties fo:language="fr" fo:country="FR"/>
    </style:style>
    <style:style style:name="P55" style:parent-style-name="Normal" style:family="paragraph">
      <style:text-properties fo:language="fr" fo:country="FR"/>
    </style:style>
    <style:style style:name="P56" style:parent-style-name="Normal" style:family="paragraph">
      <style:text-properties fo:language="fr" fo:country="FR"/>
    </style:style>
    <style:style style:name="P57" style:parent-style-name="Normal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Normal" style:family="paragraph">
      <style:text-properties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text-properties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P74" style:parent-style-name="Normal" style:family="paragraph">
      <style:text-properties fo:language="fr" fo:country="FR"/>
    </style:style>
    <style:style style:name="P75" style:parent-style-name="Normal" style:family="paragraph">
      <style:text-properties fo:language="fr" fo:country="FR"/>
    </style:style>
    <style:style style:name="P76" style:parent-style-name="Normal" style:family="paragraph">
      <style:text-properties fo:language="fr" fo:country="FR"/>
    </style:style>
    <style:style style:name="P77" style:parent-style-name="Normal" style:family="paragraph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Normal" style:family="paragraph">
      <style:text-properties fo:language="fr" fo:country="FR"/>
    </style:style>
    <style:style style:name="P80" style:parent-style-name="Normal" style:family="paragraph">
      <style:text-properties fo:language="fr" fo:country="FR"/>
    </style:style>
    <style:style style:name="P81" style:parent-style-name="Normal" style:family="paragraph">
      <style:text-properties fo:language="fr" fo:country="FR"/>
    </style:style>
    <style:style style:name="P82" style:parent-style-name="Normal" style:family="paragraph">
      <style:text-properties fo:language="fr" fo:country="FR"/>
    </style:style>
    <style:style style:name="P83" style:parent-style-name="Normal" style:family="paragraph">
      <style:text-properties fo:language="fr" fo:country="FR"/>
    </style:style>
    <style:style style:name="P84" style:parent-style-name="Normal" style:family="paragraph">
      <style:text-properties fo:language="fr" fo:country="FR"/>
    </style:style>
    <style:style style:name="P85" style:parent-style-name="Normal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P87" style:parent-style-name="Normal" style:family="paragraph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fo:language="fr" fo:country="FR"/>
    </style:style>
    <style:style style:name="P90" style:parent-style-name="Normal" style:family="paragraph">
      <style:text-properties fo:language="fr" fo:country="FR"/>
    </style:style>
    <style:style style:name="P91" style:parent-style-name="Normal" style:family="paragraph">
      <style:text-properties fo:language="fr" fo:country="FR"/>
    </style:style>
    <style:style style:name="T92" style:parent-style-name="Policepardéfaut" style:family="text">
      <style:text-properties fo:language="fr" fo:country="FR"/>
    </style:style>
    <style:style style:name="T93" style:parent-style-name="Policepardéfaut" style:family="text"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P96" style:parent-style-name="Normal" style:family="paragraph">
      <style:text-properties fo:language="fr" fo:country="FR"/>
    </style:style>
    <style:style style:name="T97" style:parent-style-name="Policepardéfaut" style:family="text">
      <style:text-properties fo:language="fr" fo:country="FR"/>
    </style:style>
    <style:style style:name="T98" style:parent-style-name="Policepardéfaut" style:family="text">
      <style:text-properties fo:language="fr" fo:country="FR"/>
    </style:style>
    <style:style style:name="P99" style:parent-style-name="Normal" style:family="paragraph">
      <style:text-properties fo:language="fr" fo:country="FR"/>
    </style:style>
    <style:style style:name="P100" style:parent-style-name="Normal" style:family="paragraph">
      <style:text-properties fo:language="fr" fo:country="FR"/>
    </style:style>
    <style:style style:name="P101" style:parent-style-name="Normal" style:family="paragraph">
      <style:text-properties fo:language="fr" fo:country="FR"/>
    </style:style>
    <style:style style:name="P102" style:parent-style-name="Normal" style:family="paragraph">
      <style:text-properties fo:language="fr" fo:country="FR"/>
    </style:style>
    <style:style style:name="P103" style:parent-style-name="Normal" style:family="paragraph">
      <style:text-properties fo:language="fr" fo:country="FR"/>
    </style:style>
    <style:style style:name="P104" style:parent-style-name="Normal" style:family="paragraph">
      <style:text-properties fo:language="fr" fo:country="FR"/>
    </style:style>
    <style:style style:name="P105" style:parent-style-name="Normal" style:family="paragraph">
      <style:text-properties fo:language="fr" fo:country="FR"/>
    </style:style>
    <style:style style:name="P106" style:parent-style-name="Normal" style:family="paragraph">
      <style:text-properties fo:language="fr" fo:country="FR"/>
    </style:style>
    <style:style style:name="P107" style:parent-style-name="Normal" style:family="paragraph">
      <style:text-properties fo:language="fr" fo:country="FR"/>
    </style:style>
    <style:style style:name="P108" style:parent-style-name="Normal" style:family="paragraph">
      <style:text-properties fo:language="fr" fo:country="FR"/>
    </style:style>
    <style:style style:name="P109" style:parent-style-name="Normal" style:family="paragraph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Normal" style:family="paragraph">
      <style:text-properties fo:language="fr" fo:country="FR"/>
    </style:style>
    <style:style style:name="P113" style:parent-style-name="Normal" style:family="paragraph">
      <style:text-properties fo:language="fr" fo:country="FR"/>
    </style:style>
    <style:style style:name="P114" style:parent-style-name="Normal" style:family="paragraph">
      <style:text-properties fo:language="fr" fo:country="FR"/>
    </style:style>
    <style:style style:name="P115" style:parent-style-name="Normal" style:family="paragraph">
      <style:text-properties fo:language="fr" fo:country="FR"/>
    </style:style>
    <style:style style:name="P116" style:parent-style-name="Normal" style:family="paragraph">
      <style:text-properties fo:language="fr" fo:country="FR"/>
    </style:style>
    <style:style style:name="P117" style:parent-style-name="Normal" style:family="paragraph">
      <style:text-properties fo:language="fr" fo:country="FR"/>
    </style:style>
    <style:style style:name="P118" style:parent-style-name="Normal" style:family="paragraph">
      <style:text-properties fo:language="fr" fo:country="FR"/>
    </style:style>
    <style:style style:name="P119" style:parent-style-name="Normal" style:family="paragraph">
      <style:text-properties fo:language="fr" fo:country="FR"/>
    </style:style>
    <style:style style:name="P120" style:parent-style-name="Normal" style:family="paragraph">
      <style:text-properties fo:language="fr" fo:country="FR"/>
    </style:style>
    <style:style style:name="P121" style:parent-style-name="Normal" style:family="paragraph">
      <style:text-properties fo:language="fr" fo:country="FR"/>
    </style:style>
    <style:style style:name="P122" style:parent-style-name="Normal" style:family="paragraph">
      <style:text-properties fo:language="fr" fo:country="FR"/>
    </style:style>
    <style:style style:name="P123" style:parent-style-name="Normal" style:family="paragraph">
      <style:text-properties fo:language="fr" fo:country="FR"/>
    </style:style>
    <style:style style:name="T124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{</text:p>
      <text:p text:style-name="P2"><text:s text:c="2"/>"assistant_name": "Samui AI Concierge",</text:p>
      <text:p text:style-name="Normal"><text:span text:style-name="T3"><text:s text:c="2"/>"description": "Assistant de voyage local à Koh Samui<text:s/></text:span><text:span text:style-name="T4">🌴</text:span><text:span text:style-name="T5"><text:s/>– aide à planifier séjours, activités et expériences authentiques.",</text:span></text:p>
      <text:p text:style-name="P6"><text:s text:c="2"/>"system_instructions": {</text:p>
      <text:p text:style-name="Normal"><text:span text:style-name="T7"><text:s text:c="4"/>"persona": "Tu es Samui AI Concierge<text:s/></text:span><text:span text:style-name="T8">🌴</text:span><text:span text:style-name="T9">, un assistant de voyage local spécialisé sur Koh Samui, bienveillant, souriant et toujours utile. Tu aides les voyageurs à planifier leur séjour selon leurs envies : détente, aventure, culture, gastronomie ou bien-être. Tu proposes des suggestions précises, fondées sur les profils, la météo et la saison. Tu parles principalement français, mais tu peux aussi t'exprimer en anglais sur demande.",</text:span></text:p>
      <text:p text:style-name="P10"><text:s text:c="4"/>"behavior": [</text:p>
      <text:p text:style-name="P11"><text:s text:c="6"/>"Adapte toujours tes réponses au profil du voyageur : budget, type de séjour, motivation, saison, météo.",</text:p>
      <text:p text:style-name="P12"><text:s text:c="6"/>"Privilégie les expériences authentiques et locales plutôt que les attractions trop touristiques.",</text:p>
      <text:p text:style-name="P13"><text:s text:c="6"/>"Pour chaque recommandation, donne une description courte, un prix indicatif (THB) et un lien TripAdvisor ou site officiel si disponible.",</text:p>
      <text:p text:style-name="P14"><text:s text:c="6"/>"Répond de manière conviviale et immersive, avec un ton inspirant et positif.",</text:p>
      <text:p text:style-name="P15"><text:s text:c="6"/>"Si le voyageur demande une traduction ou parle anglais, bascule automatiquement en anglais."</text:p>
      <text:p text:style-name="Normal"><text:span text:style-name="T16"><text:s text:c="4"/></text:span>]</text:p>
      <text:p text:style-name="Normal"><text:s text:c="2"/>},</text:p>
      <text:p text:style-name="Normal"><text:s text:c="2"/>"languages": {</text:p>
      <text:p text:style-name="Normal"><text:s text:c="4"/>"default": "fr",</text:p>
      <text:p text:style-name="Normal"><text:s text:c="4"/>"supported": ["fr", "en"],</text:p>
      <text:p text:style-name="Normal"><text:s text:c="4"/>"translation_api": "Google Cloud Translate",</text:p>
      <text:p text:style-name="Normal"><text:s text:c="4"/>"multi_language_support": true</text:p>
      <text:p text:style-name="Normal"><text:s text:c="2"/>},</text:p>
      <text:p text:style-name="Normal"><text:s text:c="2"/>"modules": {</text:p>
      <text:soft-page-break/>
      <text:p text:style-name="Normal"><text:s text:c="4"/>"weather": {</text:p>
      <text:p text:style-name="Normal"><text:s text:c="6"/>"provider": "Google Weather API",</text:p>
      <text:p text:style-name="Normal"><text:s text:c="6"/>"functions": ["current_conditions", "forecast_7days", "alerts"],</text:p>
      <text:p text:style-name="Normal"><text:s text:c="6"/><text:span text:style-name="T17">"usage": "Fournir météo en temps réel pour Koh Samui, conditions mer et conseils saisonniers"</text:span></text:p>
      <text:p text:style-name="Normal"><text:span text:style-name="T18"><text:s text:c="4"/></text:span>},</text:p>
      <text:p text:style-name="Normal"><text:s text:c="4"/>"reviews": {</text:p>
      <text:p text:style-name="Normal"><text:s text:c="6"/>"sources": ["Google Places API", "TripAdvisor API"],</text:p>
      <text:p text:style-name="Normal"><text:s text:c="6"/><text:span text:style-name="T19">"usage": "Afficher les avis et notes pour hôtels, restaurants et activités locales"</text:span></text:p>
      <text:p text:style-name="Normal"><text:span text:style-name="T20"><text:s text:c="4"/></text:span>},</text:p>
      <text:p text:style-name="Normal"><text:s text:c="4"/>"data_file": {</text:p>
      <text:p text:style-name="Normal"><text:s text:c="6"/>"path": "/data/samui_data.txt",</text:p>
      <text:p text:style-name="Normal"><text:s text:c="6"/><text:span text:style-name="T21">"editable": true,</text:span></text:p>
      <text:p text:style-name="P22"><text:s text:c="6"/>"usage": "Base de connaissances modifiable contenant les infos sur les lieux, activités et recommandations"</text:p>
      <text:p text:style-name="P23"><text:s text:c="4"/>}</text:p>
      <text:p text:style-name="P24"><text:s text:c="2"/>},</text:p>
      <text:p text:style-name="P25"><text:s text:c="2"/>"profiles": {</text:p>
      <text:p text:style-name="P26"><text:s text:c="4"/>"budget": ["économique", "moyen", "luxe"],</text:p>
      <text:p text:style-name="P27"><text:s text:c="4"/>"motivation": ["détente", "aventure", "wellness", "gastronomie", "culture"],</text:p>
      <text:p text:style-name="P28"><text:s text:c="4"/>"group": ["solo", "couple", "famille", "amis"],</text:p>
      <text:p text:style-name="P29"><text:s text:c="4"/>"duration": ["weekend", "semaine", "long séjour"],</text:p>
      <text:p text:style-name="P30"><text:s text:c="4"/>"season": ["haute", "basse"]</text:p>
      <text:p text:style-name="P31"><text:s text:c="2"/>},</text:p>
      <text:p text:style-name="P32"><text:s text:c="2"/>"hotels": {</text:p>
      <text:p text:style-name="P33"><text:s text:c="4"/>"Bophut": [</text:p>
      <text:p text:style-name="P34"><text:s text:c="6"/>"Anantara Bophut Koh Samui Resort",</text:p>
      <text:soft-page-break/>
      <text:p text:style-name="P35"><text:s text:c="6"/>"Bandara Resort &amp; Spa",</text:p>
      <text:p text:style-name="P36"><text:s text:c="6"/>"Bo Phut Resort &amp; Spa",</text:p>
      <text:p text:style-name="Normal"><text:span text:style-name="T37"><text:s text:c="6"/></text:span>"Cielo Boutique Hotel &amp; Spa",</text:p>
      <text:p text:style-name="Normal"><text:s text:c="6"/>"Garrya Tongsai Bay Samui",</text:p>
      <text:p text:style-name="Normal"><text:s text:c="6"/>"Holiday Inn Resort Samui Bophut Beach",</text:p>
      <text:p text:style-name="Normal"><text:s text:c="6"/>"The White Cottage",</text:p>
      <text:p text:style-name="Normal"><text:s text:c="6"/>"Wild Cottages Elephant Sanctuary Resort",</text:p>
      <text:p text:style-name="Normal"><text:s text:c="6"/>"Karma Resort",</text:p>
      <text:p text:style-name="Normal"><text:s text:c="6"/>"Hansar Samui Resort &amp; Spa"</text:p>
      <text:p text:style-name="Normal"><text:s text:c="4"/>],</text:p>
      <text:p text:style-name="Normal"><text:s text:c="4"/>"Chaweng": [</text:p>
      <text:p text:style-name="Normal"><text:s text:c="6"/>"SALA Samui Chaweng Beach Resort",</text:p>
      <text:p text:style-name="Normal"><text:s text:c="6"/>"Centara Reserve Samui",</text:p>
      <text:p text:style-name="Normal"><text:s text:c="6"/>"OZO Chaweng Samui",</text:p>
      <text:p text:style-name="Normal"><text:s text:c="6"/>"NH Collection Samui Peace Resort",</text:p>
      <text:p text:style-name="Normal"><text:s text:c="6"/>"Chaweng Regent Beach Resort",</text:p>
      <text:p text:style-name="Normal"><text:s text:c="6"/>"The Library",</text:p>
      <text:p text:style-name="Normal"><text:s text:c="6"/>"Avani Chaweng Samui Hotel &amp; Beach Club",</text:p>
      <text:p text:style-name="Normal"><text:s text:c="6"/><text:span text:style-name="T38">"Mantra Samui Resort",</text:span></text:p>
      <text:p text:style-name="P39"><text:s text:c="6"/>"Nora Beach Resort &amp; Spa",</text:p>
      <text:p text:style-name="P40"><text:s text:c="6"/>"Amari Koh Samui"</text:p>
      <text:p text:style-name="P41"><text:s text:c="4"/>],</text:p>
      <text:p text:style-name="P42"><text:s text:c="4"/>"Lamai": [</text:p>
      <text:p text:style-name="Normal"><text:span text:style-name="T43"><text:s text:c="6"/></text:span>"Banyan Tree Samui",</text:p>
      <text:p text:style-name="Normal"><text:s text:c="6"/>"Samui Sense Beach Resort",</text:p>
      <text:p text:style-name="Normal"><text:s text:c="6"/>"The Lamai Samui",</text:p>
      <text:soft-page-break/>
      <text:p text:style-name="Normal"><text:s text:c="6"/>"Silavadee Pool Spa Resort",</text:p>
      <text:p text:style-name="Normal"><text:s text:c="6"/>"Beach Republic Samui",</text:p>
      <text:p text:style-name="Normal"><text:s text:c="6"/>"Rocky's Boutique Resort",</text:p>
      <text:p text:style-name="Normal"><text:s text:c="6"/>"Pavilion Samui Villas &amp; Resort",</text:p>
      <text:p text:style-name="Normal"><text:s text:c="6"/>"Thai House Beach Resort",</text:p>
      <text:p text:style-name="Normal"><text:s text:c="6"/><text:span text:style-name="T44">"Renaissance Koh Samui Resort &amp; Spa",</text:span></text:p>
      <text:p text:style-name="Normal"><text:span text:style-name="T45"><text:s text:c="6"/></text:span>"X2 Koh Samui Resort"</text:p>
      <text:p text:style-name="Normal"><text:s text:c="4"/>],</text:p>
      <text:p text:style-name="Normal"><text:s text:c="4"/>"Maenam": [</text:p>
      <text:p text:style-name="Normal"><text:s text:c="6"/>"Santiburi Koh Samui",</text:p>
      <text:p text:style-name="Normal"><text:s text:c="6"/>"Fair House Villas &amp; Spa",</text:p>
      <text:p text:style-name="Normal"><text:s text:c="6"/>"Mantra Samui Resort – Adults Only",</text:p>
      <text:p text:style-name="Normal"><text:s text:c="6"/>"The COAST Adults Only Resort",</text:p>
      <text:p text:style-name="Normal"><text:s text:c="6"/>"W Koh Samui",</text:p>
      <text:p text:style-name="Normal"><text:s text:c="6"/>"Khwan Beach Resort",</text:p>
      <text:p text:style-name="Normal"><text:s text:c="6"/>"The Sea Koh Samui Resort &amp; Spa",</text:p>
      <text:p text:style-name="Normal"><text:s text:c="6"/>"Celes Beachfront Resort",</text:p>
      <text:p text:style-name="Normal"><text:s text:c="6"/>"Ampha Place Hotel",</text:p>
      <text:p text:style-name="Normal"><text:s text:c="6"/>"Escape Beach Resort"</text:p>
      <text:p text:style-name="Normal"><text:s text:c="4"/>]</text:p>
      <text:p text:style-name="Normal"><text:s text:c="2"/>},</text:p>
      <text:p text:style-name="Normal"><text:s text:c="2"/>"spas_and_massages": [</text:p>
      <text:p text:style-name="Normal"><text:s text:c="4"/>"SALA Spa Chaweng",</text:p>
      <text:p text:style-name="Normal"><text:s text:c="4"/>"Tamarind Springs Forest Spa",</text:p>
      <text:p text:style-name="Normal"><text:s text:c="4"/>"Eranda Herbal Spa",</text:p>
      <text:p text:style-name="Normal"><text:s text:c="4"/>"Anantara Spa (Bophut / Lawana)",</text:p>
      <text:soft-page-break/>
      <text:p text:style-name="Normal"><text:s text:c="4"/>"Four Seasons Spa Koh Samui",</text:p>
      <text:p text:style-name="Normal"><text:s text:c="4"/>"Kimpton Kitalay Spa &amp; Massage",</text:p>
      <text:p text:style-name="Normal"><text:s text:c="4"/>"Santiburi Spa",</text:p>
      <text:p text:style-name="Normal"><text:s text:c="4"/>"Ban Sabai Spa",</text:p>
      <text:p text:style-name="Normal"><text:s text:c="4"/>"Karma Spa &amp; Wellness",</text:p>
      <text:p text:style-name="Normal"><text:s text:c="4"/>"Zazen Spa Bophut",</text:p>
      <text:p text:style-name="Normal"><text:s text:c="4"/>"Magnolia Spa Chaweng",</text:p>
      <text:p text:style-name="Normal"><text:s text:c="4"/>"The Source Herbal Detox Retreat",</text:p>
      <text:p text:style-name="Normal"><text:s text:c="4"/>"Spa Serenity Maenam",</text:p>
      <text:p text:style-name="Normal"><text:s text:c="4"/>"Harnn Heritage Spa",</text:p>
      <text:p text:style-name="Normal"><text:s text:c="4"/><text:span text:style-name="T46">"Akiira Spa Chaweng"</text:span></text:p>
      <text:p text:style-name="P47"><text:s text:c="2"/>],</text:p>
      <text:p text:style-name="P48"><text:s text:c="2"/>"activities": [</text:p>
      <text:p text:style-name="P49"><text:s text:c="4"/>{</text:p>
      <text:p text:style-name="P50"><text:s text:c="6"/>"category": "aventure / nature",</text:p>
      <text:p text:style-name="P51"><text:s text:c="6"/>"list": [</text:p>
      <text:p text:style-name="P52"><text:s text:c="8"/>"Excursion Ang Thong Marine Park",</text:p>
      <text:p text:style-name="P53"><text:s text:c="8"/>"Plongée à Koh Tao",</text:p>
      <text:p text:style-name="P54"><text:s text:c="8"/>"Randonnée aux cascades Na Muang",</text:p>
      <text:p text:style-name="P55"><text:s text:c="8"/>"Secret Buddha Garden",</text:p>
      <text:p text:style-name="P56"><text:s text:c="8"/>"Quad dans la jungle",</text:p>
      <text:p text:style-name="P57"><text:s text:c="8"/>"Safari 4x4 à Koh Samui",</text:p>
      <text:p text:style-name="P58"><text:s text:c="8"/>"Kayak dans la mangrove de Koh Taen",</text:p>
      <text:p text:style-name="P59"><text:s text:c="8"/>"Snorkeling à Koh Mudsum",</text:p>
      <text:p text:style-name="P60"><text:s text:c="8"/>"Observation du lever du soleil au sommet Khao Hua Jook",</text:p>
      <text:p text:style-name="P61"><text:s text:c="8"/>"Visite de la cascade Hin Lat"</text:p>
      <text:soft-page-break/>
      <text:p text:style-name="P62"><text:s text:c="6"/>]</text:p>
      <text:p text:style-name="P63"><text:s text:c="4"/>},</text:p>
      <text:p text:style-name="P64"><text:s text:c="4"/>{</text:p>
      <text:p text:style-name="P65"><text:s text:c="6"/>"category": "détente / bien-être",</text:p>
      <text:p text:style-name="P66"><text:s text:c="6"/>"list": [</text:p>
      <text:p text:style-name="P67"><text:s text:c="8"/>"Massage jungle au Tamarind Springs",</text:p>
      <text:p text:style-name="P68"><text:s text:c="8"/>"Yoga &amp; brunch au Vikasa Life Café",</text:p>
      <text:p text:style-name="P69"><text:s text:c="8"/>"Bain aux herbes locales",</text:p>
      <text:p text:style-name="P70"><text:s text:c="8"/>"Méditation guidée au bord de la mer",</text:p>
      <text:p text:style-name="P71"><text:s text:c="8"/>"Spa en plein air au Sala Samui",</text:p>
      <text:p text:style-name="P72"><text:s text:c="8"/>"Massage aromathérapie au Zazen Spa",</text:p>
      <text:p text:style-name="P73"><text:s text:c="8"/>"Cours de respiration &amp; Qi Gong",</text:p>
      <text:p text:style-name="P74"><text:s text:c="8"/>"Bain de fleurs tropicales",</text:p>
      <text:p text:style-name="P75"><text:s text:c="8"/>"Rituel spa en couple",</text:p>
      <text:p text:style-name="P76"><text:s text:c="8"/>"Massage sunset sur plage privée"</text:p>
      <text:p text:style-name="P77"><text:s text:c="6"/>]</text:p>
      <text:p text:style-name="P78"><text:s text:c="4"/>},</text:p>
      <text:p text:style-name="P79"><text:s text:c="4"/>{</text:p>
      <text:p text:style-name="P80"><text:s text:c="6"/>"category": "culture / patrimoine",</text:p>
      <text:p text:style-name="P81"><text:s text:c="6"/>"list": [</text:p>
      <text:p text:style-name="P82"><text:s text:c="8"/>"Visite du temple Big Buddha",</text:p>
      <text:p text:style-name="P83"><text:s text:c="8"/>"Wat Plai Laem",</text:p>
      <text:p text:style-name="P84"><text:s text:c="8"/>"Wat Khunaram",</text:p>
      <text:p text:style-name="P85"><text:s text:c="8"/>"Marché Fisherman’s Village",</text:p>
      <text:p text:style-name="P86"><text:s text:c="8"/>"Cours de cuisine thaïe (Pai Cookery Class)",</text:p>
      <text:p text:style-name="P87"><text:s text:c="8"/>"Musée des coquillages de Samui",</text:p>
      <text:soft-page-break/>
      <text:p text:style-name="P88"><text:s text:c="8"/>"Atelier de sculpture sur bois",</text:p>
      <text:p text:style-name="P89"><text:s text:c="8"/>"Visite du temple Laem Sor",</text:p>
      <text:p text:style-name="P90"><text:s text:c="8"/>"Spectacle de danse traditionnelle",</text:p>
      <text:p text:style-name="P91"><text:s text:c="8"/>"Découverte d’un village de pêcheurs local"</text:p>
      <text:p text:style-name="Normal"><text:span text:style-name="T92"><text:s text:c="6"/></text:span>]</text:p>
      <text:p text:style-name="Normal"><text:s text:c="4"/>},</text:p>
      <text:p text:style-name="Normal"><text:s text:c="4"/>{</text:p>
      <text:p text:style-name="Normal"><text:s text:c="6"/>"category": "gastronomie / food",</text:p>
      <text:p text:style-name="Normal"><text:s text:c="6"/>"list": [</text:p>
      <text:p text:style-name="Normal"><text:s text:c="8"/>"Dîner au Jungle Club (vue sunset)",</text:p>
      <text:p text:style-name="Normal"><text:s text:c="8"/><text:span text:style-name="T93">"Street food tour à Chaweng",</text:span></text:p>
      <text:p text:style-name="P94"><text:s text:c="8"/>"Dégustation de fruits tropicaux",</text:p>
      <text:p text:style-name="P95"><text:s text:c="8"/>"Atelier desserts thaïs (mango sticky rice)",</text:p>
      <text:p text:style-name="P96"><text:s text:c="8"/>"Dîner romantique sur la plage",</text:p>
      <text:p text:style-name="Normal"><text:span text:style-name="T97"><text:s text:c="8"/></text:span>"Brunch healthy à Vikasa Life Café",</text:p>
      <text:p text:style-name="Normal"><text:s text:c="8"/><text:span text:style-name="T98">"Visite du marché local de Maenam",</text:span></text:p>
      <text:p text:style-name="P99"><text:s text:c="8"/>"Food tour Fisherman’s Village",</text:p>
      <text:p text:style-name="P100"><text:s text:c="8"/>"Cours de cocktails tropicaux",</text:p>
      <text:p text:style-name="P101"><text:s text:c="8"/>"Visite de la distillerie de rhum local"</text:p>
      <text:p text:style-name="P102"><text:s text:c="6"/>]</text:p>
      <text:p text:style-name="P103"><text:s text:c="4"/>},</text:p>
      <text:p text:style-name="P104"><text:s text:c="4"/>{</text:p>
      <text:p text:style-name="P105"><text:s text:c="6"/>"category": "famille / enfants",</text:p>
      <text:p text:style-name="P106"><text:s text:c="6"/>"list": [</text:p>
      <text:p text:style-name="P107"><text:s text:c="8"/>"Samui Elephant Sanctuary",</text:p>
      <text:p text:style-name="P108"><text:s text:c="8"/>"Mini-golf à Lamai",</text:p>
      <text:soft-page-break/>
      <text:p text:style-name="P109"><text:s text:c="8"/>"Aquarium &amp; Tiger Zoo",</text:p>
      <text:p text:style-name="P110"><text:s text:c="8"/>"Ferme de papillons",</text:p>
      <text:p text:style-name="P111"><text:s text:c="8"/>"Visite d’une ferme de fruits tropicaux",</text:p>
      <text:p text:style-name="P112"><text:s text:c="8"/>"Excursion en bateau à fond transparent",</text:p>
      <text:p text:style-name="P113"><text:s text:c="8"/>"Parc aquatique Pink Elephant Samui",</text:p>
      <text:p text:style-name="P114"><text:s text:c="8"/>"Atelier de cerf-volant",</text:p>
      <text:p text:style-name="P115"><text:s text:c="8"/>"Spectacle de feu à Coco Tam’s",</text:p>
      <text:p text:style-name="P116"><text:s text:c="8"/>"Balade douce en forêt avec guide nature"</text:p>
      <text:p text:style-name="P117"><text:s text:c="6"/>]</text:p>
      <text:p text:style-name="P118"><text:s text:c="4"/>},</text:p>
      <text:p text:style-name="P119"><text:s text:c="4"/>{</text:p>
      <text:p text:style-name="P120"><text:s text:c="6"/>"category": "soir / divertissement",</text:p>
      <text:p text:style-name="P121"><text:s text:c="6"/>"list": [</text:p>
      <text:p text:style-name="P122"><text:s text:c="8"/>"Spectacle de feu sur la plage (Coco Tam’s)",</text:p>
      <text:p text:style-name="P123"><text:s text:c="8"/>"Marché de nuit Fisherman’s Village (vendredi)",</text:p>
      <text:p text:style-name="Normal"><text:span text:style-name="T124"><text:s text:c="8"/></text:span>"Bar panoramique Jungle Club",</text:p>
      <text:p text:style-name="Normal"><text:s text:c="8"/>"Concerts live à Chaweng",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il.joseph32@gmail.com</meta:initial-creator>
    <dc:creator>cyril.joseph32@gmail.com</dc:creator>
    <meta:creation-date>2025-10-09T07:51:00Z</meta:creation-date>
    <dc:date>2025-10-09T07:52:00Z</dc:date>
    <meta:template xlink:href="Normal" xlink:type="simple"/>
    <meta:editing-cycles>1</meta:editing-cycles>
    <meta:editing-duration>PT60S</meta:editing-duration>
    <meta:document-statistic meta:page-count="8" meta:paragraph-count="13" meta:word-count="1030" meta:character-count="6889" meta:row-count="48" meta:non-whitespace-character-count="5872"/>
  </office:meta>
</office:document-meta>
</file>